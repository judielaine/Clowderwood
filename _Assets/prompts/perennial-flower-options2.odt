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2A0000014C96D6A74D.png" manifest:media-type="image/png"/>
  <manifest:file-entry manifest:full-path="Pictures/100000010000032A00000246FB437C7F.png" manifest:media-type="image/png"/>
  <manifest:file-entry manifest:full-path="Pictures/100000010000035C0000036679C69BB7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118in" svg:y="-0.722in" svg:width="4.4in" svg:height="4.4516in" draw:z-index="0"><draw:image xlink:href="Pictures/100000010000035C0000036679C69BB7.png" xlink:type="simple" xlink:show="embed" xlink:actuate="onLoad" draw:mime-type="image/png"/></draw:frame><draw:frame draw:style-name="fr1" draw:name="Image2" text:anchor-type="char" svg:x="-0.561in" svg:y="3.5484in" svg:width="4.3028in" svg:height="3.0917in" draw:z-index="1"><draw:image xlink:href="Pictures/100000010000032A00000246FB437C7F.png" xlink:type="simple" xlink:show="embed" xlink:actuate="onLoad" draw:mime-type="image/png"/></draw:frame><draw:frame draw:style-name="fr1" draw:name="Image3" text:anchor-type="char" svg:x="-0.561in" svg:y="6.6398in" svg:width="4.148in" svg:height="1.7in" draw:z-index="2"><draw:image xlink:href="Pictures/100000010000032A0000014C96D6A7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5:26:33.997524290</meta:creation-date>
    <meta:print-date>2026-02-07T15:28:46.388836250</meta:print-date>
    <meta:printed-by>PDF files</meta:printed-by>
    <dc:date>2026-02-07T15:29:05.722992243</dc:date>
    <meta:editing-duration>PT19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24.2.3.2$MacOSX_AARCH64 LibreOffice_project/433d9c2ded56988e8a90e6b2e771ee4e6a5ab2ba</meta:generator>
  </office:meta>
</office:document-meta>
</file>